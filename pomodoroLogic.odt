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08D6A0104317545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Ink Free" fo:font-size="20pt" style:text-underline-style="none" fo:font-weight="bold" officeooo:rsid="001ebdc1" officeooo:paragraph-rsid="001ebdc1" style:font-size-asian="20pt" style:font-weight-asian="bold" style:font-size-complex="20pt" style:font-weight-complex="bold"/>
    </style:style>
    <style:style style:name="P2" style:family="paragraph" style:parent-style-name="Standard">
      <style:paragraph-properties fo:text-align="center" style:justify-single-word="false"/>
      <style:text-properties fo:color="#000000" loext:opacity="100%" style:font-name="Ink Free" fo:font-size="24pt" style:text-underline-style="solid" style:text-underline-width="bold" style:text-underline-color="font-color" fo:font-weight="bold" officeooo:rsid="001ebdc1" officeooo:paragraph-rsid="001ebdc1" style:font-size-asian="24pt" style:font-weight-asian="bold" style:font-size-complex="24pt" style:font-weight-complex="bold"/>
    </style:style>
    <style:style style:name="P3" style:family="paragraph" style:parent-style-name="Standard">
      <style:paragraph-properties fo:text-align="start" style:justify-single-word="false"/>
      <style:text-properties fo:color="#000000" loext:opacity="100%" style:font-name="Ink Free" fo:font-size="14pt" style:text-underline-style="none" fo:font-weight="bold" officeooo:rsid="001ebdc1" officeooo:paragraph-rsid="001ebdc1" style:font-size-asian="12.25pt" style:font-weight-asian="bold" style:font-size-complex="14pt" style:font-weight-complex="bold"/>
    </style:style>
    <style:style style:name="T1" style:family="text">
      <style:text-properties officeooo:rsid="0020554f"/>
    </style:style>
    <style:style style:name="T2" style:family="text">
      <style:text-properties fo:font-style="italic" officeooo:rsid="0020554f" style:font-style-asian="italic" style:font-style-complex="italic"/>
    </style:style>
    <style:style style:name="T3" style:family="text">
      <style:text-properties fo:font-style="normal" officeooo:rsid="0020554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modoro Clock Logic</text:p>
      <text:p text:style-name="P1"><text:tab/>I built my Pomodoro Clock from scratch. I imported the following Hooks: useState, useRef, useEffect. I also imported the Button and ButtonGroup from React-Bootstrap for styling purposes and the alarm sound to use in my code.</text:p>
      <text:p text:style-name="P1"><text:tab/>My component was called Timer. At the top I set the sessionTime to a default value of 25, which shows on page load. I set the breakTime to a default value of 5. The timerLabel is originally set to “Session”, timeLeft is set to 1500, and isRunning is set to false.</text:p>
      <text:p text:style-name="P1"><text:tab/>My initialTime variable is an array containing an object, which holds the mathematical formulas for keeping track of the minutes and seconds. It turns them to strings and keeps them in the mm:ss format required.</text:p>
      <text:p text:style-name="P1"><text:tab/>I have useRefs set for incrementing and decrementing both the sessions and breaks. I also have an audioRef, which controls my alarm sound.</text:p>
      <text:p text:style-name="P1"><text:tab/>In my useEffect, I have a tmIntId(time interval id) that, upon isRunning being true, sets the interval of timeLeft to subtract by 1 every second. If the timeLeft gets to 00:00, the alarm will play for 2.5s and then pause. If the alarm plays, and if the timerLabel is set to “Session”, the timerLabel will switch to “Break” and timeLeft keeps track of the breakTime by the second. If the timerLabel is set to “Break” when the alarm plays, the timerLabel will switch back to “Session” and keep <text:soft-page-break/>track of the sessionTime by the second. It returns the clearInterval for the tmIntId. The dependencies are: isRunning, timeLeft, timerLabel, actualTimeLeft. <text:span text:style-name="T1">Dependencies are reactive values that are declared directly inside the components. If you specify dependencies, the Effect runs after the initial render </text:span><text:span text:style-name="T2">and</text:span><text:span text:style-name="T3"> after re-renders with changed dependencies.</text:span></text:p>
      <text:p text:style-name="P1"><text:span text:style-name="T3"><text:tab/>I have separate functions to handle both the incrementing and decrementing of the Session and Break lengths. You cannot set the sessionLength higher than 60 and the breakLength less than 1. </text:span></text:p>
      <text:p text:style-name="P1"><text:span text:style-name="T3"><text:tab/>The handleStartSop function toggles between isRunning and !isRunning.</text:span></text:p>
      <text:p text:style-name="P1"><text:span text:style-name="T3"><text:tab/>The handleReset function resets all the state to its original values.</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Paper_20_Crumpled" draw:display-name="Paper Crumpled" xlink:href="Pictures/10000000000002000000020008D6A0104317545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draw:fill="bitmap" draw:fill-image-name="Paper_20_Crumpled" draw:fill-image-width="0in" draw:fill-image-height="0in" style:repeat="repeat" draw:fill-image-ref-point-x="0%" draw:fill-image-ref-point-y="0%" draw:fill-image-ref-point="center" draw:tile-repeat-offset="0% vertical" style:footnote-max-height="0in" loext:margin-gutter="0in">
        <style:background-image xlink:href="Pictures/10000000000002000000020008D6A01043175452.jp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fill-image-name="Paper_20_Crumpled"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rora Grace Nickel</meta:initial-creator>
    <meta:creation-date>2023-07-07T12:28:53.910000000</meta:creation-date>
    <dc:date>2023-07-07T12:55:39.975000000</dc:date>
    <dc:creator>Aurora Grace Nickel</dc:creator>
    <meta:editing-duration>PT44S</meta:editing-duration>
    <meta:editing-cycles>1</meta:editing-cycles>
    <meta:document-statistic meta:table-count="0" meta:image-count="0" meta:object-count="0" meta:page-count="2" meta:paragraph-count="9" meta:word-count="335" meta:character-count="2041" meta:non-whitespace-character-count="1706"/>
    <meta:generator>LibreOffice/7.3.3.2$Windows_X86_64 LibreOffice_project/d1d0ea68f081ee2800a922cac8f79445e4603348</meta:generator>
  </office:meta>
</office:document-meta>
</file>